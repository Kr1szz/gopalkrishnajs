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640D0462407.png" manifest:media-type="image/png"/>
  <manifest:file-entry manifest:full-path="Pictures/10000001000002D000000640B40F1FAA.png" manifest:media-type="image/png"/>
  <manifest:file-entry manifest:full-path="Pictures/10000001000002D000000640D8D5D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Courier New" svg:font-family="'Courier New', monospace"/>
    <style:font-face style:name="LM Roman 12" svg:font-family="'LM Roman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M Roman 12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LM Roman 12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M Roman 12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text-underline-style="non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font-name="Arial" fo:font-size="11pt" fo:font-style="normal" style:text-underline-style="none" fo:font-weight="normal" fo:background-color="transparent"/>
    </style:style>
    <style:style style:name="P6" style:family="paragraph" style:parent-style-name="Text_20_body">
      <loext:graphic-properties draw:fill="solid" draw:fill-color="#191a1c" draw:opacity="100%"/>
      <style:paragraph-properties fo:margin-left="0in" fo:margin-right="0in" fo:margin-top="0in" fo:margin-bottom="0in" style:contextual-spacing="false" fo:line-height="138%" fo:text-indent="0in" style:auto-text-indent="false" fo:background-color="#191a1c" style:writing-mode="lr-tb"/>
      <style:text-properties style:text-underline-style="none" fo:background-color="transparent"/>
    </style:style>
    <style:style style:name="P7" style:family="paragraph" style:parent-style-name="Text_20_body">
      <loext:graphic-properties draw:fill="solid" draw:fill-color="#191a1c" draw:opacity="100%"/>
      <style:paragraph-properties fo:margin-left="0in" fo:margin-right="0in" fo:margin-top="0in" fo:margin-bottom="0in" style:contextual-spacing="false" fo:line-height="138%" fo:text-indent="0in" style:auto-text-indent="false" fo:background-color="#191a1c" style:writing-mode="lr-tb"/>
      <style:text-properties fo:font-variant="normal" fo:text-transform="none" fo:color="#d5b778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loext:graphic-properties draw:fill="solid" draw:fill-color="#191a1c" draw:opacity="100%"/>
      <style:paragraph-properties fo:margin-left="0in" fo:margin-right="0in" fo:margin-top="0in" fo:margin-bottom="0in" style:contextual-spacing="false" fo:line-height="138%" fo:text-indent="0in" style:auto-text-indent="false" fo:background-color="#191a1c" style:writing-mode="lr-tb"/>
      <style:text-properties fo:font-variant="normal" fo:text-transform="none" fo:color="#d5b778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191a1c" draw:opacity="100%"/>
      <style:paragraph-properties fo:margin-left="0in" fo:margin-right="0in" fo:margin-top="0in" fo:margin-bottom="0in" style:contextual-spacing="false" fo:line-height="138%" fo:text-indent="0in" style:auto-text-indent="false" fo:background-color="#191a1c" style:writing-mode="lr-tb"/>
      <style:text-properties fo:font-variant="normal" fo:text-transform="none" fo:color="#bcbec4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loext:graphic-properties draw:fill="solid" draw:fill-color="#191a1c" draw:opacity="100%"/>
      <style:paragraph-properties fo:margin-left="0in" fo:margin-right="0in" fo:margin-top="0in" fo:margin-bottom="0in" style:contextual-spacing="false" fo:line-height="138%" fo:text-indent="0in" style:auto-text-indent="false" fo:background-color="#191a1c" style:writing-mode="lr-tb"/>
      <style:text-properties fo:font-variant="normal" fo:text-transform="none" fo:color="#bcbec4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text-underline-style="non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d5b778" loext:opacity="100%" style:text-line-through-style="none" style:text-line-through-type="none" style:font-name="Courier New" fo:font-size="10pt" fo:font-style="normal" fo:font-weight="normal" style:text-blinking="false"/>
    </style:style>
    <style:style style:name="T3" style:family="text">
      <style:text-properties fo:font-variant="normal" fo:text-transform="none" fo:color="#bcbec4" loext:opacity="100%" style:text-line-through-style="none" style:text-line-through-type="none" style:font-name="Courier New" fo:font-size="10pt" fo:font-style="normal" fo:font-weight="normal" style:text-blinking="false"/>
    </style:style>
    <style:style style:name="T4" style:family="text">
      <style:text-properties fo:font-variant="normal" fo:text-transform="none" fo:color="#6aab73" loext:opacity="100%" style:text-line-through-style="none" style:text-line-through-type="none" style:font-name="Courier New" fo:font-size="10pt" fo:font-style="normal" fo:font-weight="normal" style:text-blinking="false"/>
    </style:style>
    <style:style style:name="T5" style:family="text">
      <style:text-properties fo:font-variant="normal" fo:text-transform="none" fo:color="#c77dbb" loext:opacity="100%" style:text-line-through-style="none" style:text-line-through-type="none" style:font-name="Courier New" fo:font-size="10pt" fo:font-style="normal" fo:font-weight="normal" style:text-blinking="false"/>
    </style:style>
    <style:style style:name="T6" style:family="text">
      <style:text-properties fo:font-variant="normal" fo:text-transform="none" fo:color="#6aab73" loext:opacity="100%" style:text-line-through-style="none" style:text-line-through-type="none" style:text-blinking="false"/>
    </style:style>
    <style:style style:name="T7" style:family="text">
      <style:text-properties style:font-name="Courier New" fo:font-size="10pt" fo:font-style="normal" fo:font-weight="normal"/>
    </style:style>
    <style:style style:name="T8" style:family="text">
      <style:text-properties fo:font-variant="normal" fo:text-transform="none" fo:color="#d5b778" loext:opacity="100%" style:text-line-through-style="none" style:text-line-through-type="none" style:text-blinking="false"/>
    </style:style>
    <style:style style:name="T9" style:family="text">
      <style:text-properties fo:font-variant="normal" fo:text-transform="none" fo:color="#7a7e85" loext:opacity="100%" style:text-line-through-style="none" style:text-line-through-type="none" style:font-name="Courier New" fo:font-size="10pt" fo:font-style="normal" fo:font-weight="normal" style:text-blinking="false"/>
    </style:style>
    <style:style style:name="T10" style:family="text">
      <style:text-properties fo:font-variant="normal" fo:text-transform="none" fo:color="#7a7e85" loext:opacity="100%" style:text-line-through-style="none" style:text-line-through-type="none" style:text-blinking="false"/>
    </style:style>
    <style:style style:name="T11" style:family="text">
      <style:text-properties fo:font-variant="normal" fo:text-transform="none" fo:color="#cf8e6d" loext:opacity="100%" style:text-line-through-style="none" style:text-line-through-type="none" style:font-name="Courier New" fo:font-size="10pt" fo:font-style="normal" fo:font-weight="normal" style:text-blinking="false"/>
    </style:style>
    <style:style style:name="T12" style:family="text">
      <style:text-properties fo:font-variant="normal" fo:text-transform="none" fo:color="#bcbec4" loext:opacity="100%" style:text-line-through-style="none" style:text-line-through-type="none" style:text-blinking="false"/>
    </style:style>
    <style:style style:name="T13" style:family="text">
      <style:text-properties fo:font-variant="normal" fo:text-transform="none" fo:color="#56a8f5" loext:opacity="100%" style:text-line-through-style="none" style:text-line-through-type="none" style:font-name="Courier New" fo:font-size="10pt" fo:font-style="normal" fo:font-weight="normal" style:text-blinking="false"/>
    </style:style>
    <style:style style:name="T14" style:family="text">
      <style:text-properties fo:font-variant="normal" fo:text-transform="none" fo:color="#57aaf7" loext:opacity="100%" style:text-line-through-style="none" style:text-line-through-type="none" style:font-name="Courier New" fo:font-size="10pt" fo:font-style="italic" fo:font-weight="normal" style:text-blinking="false"/>
    </style:style>
    <style:style style:name="T15" style:family="text">
      <style:text-properties fo:font-variant="normal" fo:text-transform="none" fo:color="#c77dbb" loext:opacity="100%" style:text-line-through-style="none" style:text-line-through-type="none" style:font-name="Courier New" fo:font-size="10pt" fo:font-style="italic" fo:font-weight="normal" style:text-blinking="false"/>
    </style:style>
    <style:style style:name="T16" style:family="text">
      <style:text-properties fo:font-variant="normal" fo:text-transform="none" fo:color="#bcbec4" loext:opacity="100%" style:text-line-through-style="none" style:text-line-through-type="none" style:font-name="Courier New" fo:font-size="10pt" fo:font-style="normal" fo:font-weight="bold" style:text-blinking="false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blinking="false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afaef2c-7fff-3ee8-59ba-88f88782f8b5"/><text:span text:style-name="T1">Name</text:span>: Gopal krishna JS</text:p>
      <text:p text:style-name="P1"><text:span text:style-name="T1">USN</text:span>: 1RV25MC033</text:p>
      <text:p text:style-name="P1"><text:span text:style-name="T1">Semester and Section</text:span> : 1 MCA 2nd Semester ‘A’ Section</text:p>
      <text:p text:style-name="P2"/>
      <text:p text:style-name="P3">Mobile Application Development Assignment -1</text:p>
      <text:p text:style-name="P4"><text:line-break/></text:p>
      <text:p text:style-name="P5">activity_main.xml</text:p>
      <text:p text:style-name="P4"/>
      <text:p text:style-name="P6"><text:span text:style-name="T2">&lt;?</text:span><text:span text:style-name="T3">xml version</text:span><text:span text:style-name="T4">="1.0" </text:span><text:span text:style-name="T3">encoding</text:span><text:span text:style-name="T4">="utf-8"</text:span><text:span text:style-name="T2">?&gt;</text:span></text:p>
      <text:p text:style-name="P6"><text:span text:style-name="T2">&lt;ScrollView </text:span><text:span text:style-name="T3">xmlns:</text:span><text:span text:style-name="T5">android</text:span><text:span text:style-name="T4">="http://schemas.android.com/apk/res/android"</text:span></text:p>
      <text:p text:style-name="P6"><text:span text:style-name="T6">   </text:span><text:span text:style-name="T3">xmlns:</text:span><text:span text:style-name="T5">app</text:span><text:span text:style-name="T4">="http://schemas.android.com/apk/res-auto"</text:span></text:p>
      <text:p text:style-name="P6"><text:span text:style-name="T6">   </text:span><text:span text:style-name="T3">xmlns:</text:span><text:span text:style-name="T5">tools</text:span><text:span text:style-name="T4">="http://schemas.android.com/tools"</text:span></text:p>
      <text:p text:style-name="P6"><text:span text:style-name="T6">   </text:span><text:span text:style-name="T5">android</text:span><text:span text:style-name="T3">:id</text:span><text:span text:style-name="T4">="@+id/main"</text:span></text:p>
      <text:p text:style-name="P6"><text:span text:style-name="T6">   </text:span><text:span text:style-name="T5">android</text:span><text:span text:style-name="T3">:layout_width</text:span><text:span text:style-name="T4">="match_parent"</text:span></text:p>
      <text:p text:style-name="P6"><text:span text:style-name="T6">   </text:span><text:span text:style-name="T5">android</text:span><text:span text:style-name="T3">:layout_height</text:span><text:span text:style-name="T4">="match_parent"</text:span></text:p>
      <text:p text:style-name="P6"><text:span text:style-name="T6">   </text:span><text:span text:style-name="T5">android</text:span><text:span text:style-name="T3">:padding</text:span><text:span text:style-name="T4">="16dp"</text:span></text:p>
      <text:p text:style-name="P6"><text:span text:style-name="T6">   </text:span><text:span text:style-name="T5">tools</text:span><text:span text:style-name="T3">:context</text:span><text:span text:style-name="T4">=".MainActivity"</text:span><text:span text:style-name="T2">&gt;</text:span></text:p>
      <text:p text:style-name="P6"/>
      <text:p text:style-name="P7">   <text:span text:style-name="T7">&lt;LinearLayout</text:span></text:p>
      <text:p text:style-name="P6"><text:span text:style-name="T8">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</text:span><text:span text:style-name="T5">android</text:span><text:span text:style-name="T3">:orientation</text:span><text:span text:style-name="T4">="vertical"</text:span><text:span text:style-name="T2">&gt;</text:span></text:p>
      <text:p text:style-name="P6"/>
      <text:p text:style-name="P7">       <text:span text:style-name="T7">&lt;TextView</text:span></text:p>
      <text:p text:style-name="P6"><text:span text:style-name="T8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title_registration"</text:span></text:p>
      <text:p text:style-name="P6"><text:span text:style-name="T6">           </text:span><text:span text:style-name="T5">android</text:span><text:span text:style-name="T3">:textSize</text:span><text:span text:style-name="T4">="24sp"</text:span></text:p>
      <text:p text:style-name="P6"><text:span text:style-name="T6">           </text:span><text:span text:style-name="T5">android</text:span><text:span text:style-name="T3">:textStyle</text:span><text:span text:style-name="T4">="bold"</text:span></text:p>
      <text:p text:style-name="P6"><text:span text:style-name="T6">           </text:span><text:span text:style-name="T5">android</text:span><text:span text:style-name="T3">:gravity</text:span><text:span text:style-name="T4">="center"</text:span></text:p>
      <text:p text:style-name="P6"><text:span text:style-name="T6">           </text:span><text:span text:style-name="T5">android</text:span><text:span text:style-name="T3">:layout_marginBottom</text:span><text:span text:style-name="T4">="24dp" </text:span><text:span text:style-name="T2">/&gt;</text:span></text:p>
      <text:p text:style-name="P6"/>
      <text:p text:style-name="P6"><text:span text:style-name="T8">       </text:span><text:span text:style-name="T9">&lt;!-- 1. First Name --&gt;</text:span></text:p>
      <text:p text:style-name="P6"><text:soft-page-break/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FirstNam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first_name"</text:span></text:p>
      <text:p text:style-name="P6"><text:span text:style-name="T6">           </text:span><text:span text:style-name="T5">android</text:span><text:span text:style-name="T3">:inputType</text:span><text:span text:style-name="T4">="textPersonName"</text:span></text:p>
      <text:p text:style-name="P6"><text:span text:style-name="T6">           </text:span><text:span text:style-name="T5">android</text:span><text:span text:style-name="T3">:autofillHints</text:span><text:span text:style-name="T4">="personGivenNam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2. Last Name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LastNam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last_name"</text:span></text:p>
      <text:p text:style-name="P6"><text:span text:style-name="T6">           </text:span><text:span text:style-name="T5">android</text:span><text:span text:style-name="T3">:inputType</text:span><text:span text:style-name="T4">="textPersonName"</text:span></text:p>
      <text:p text:style-name="P6"><text:span text:style-name="T6">           </text:span><text:span text:style-name="T5">android</text:span><text:span text:style-name="T3">:autofillHints</text:span><text:span text:style-name="T4">="personFamilyNam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3. Date of Birth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DOB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dob"</text:span></text:p>
      <text:p text:style-name="P6"><text:span text:style-name="T6">           </text:span><text:span text:style-name="T5">android</text:span><text:span text:style-name="T3">:inputType</text:span><text:span text:style-name="T4">="date"</text:span></text:p>
      <text:p text:style-name="P6"><text:span text:style-name="T6">           </text:span><text:span text:style-name="T5">android</text:span><text:span text:style-name="T3">:autofillHints</text:span><text:span text:style-name="T4">="birthDateDay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4. Gender (Radio Buttons) --&gt;</text:span></text:p>
      <text:p text:style-name="P6"><text:span text:style-name="T10">       </text:span><text:span text:style-name="T2">&lt;TextView</text:span></text:p>
      <text:p text:style-name="P6"><text:span text:style-name="T8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label_gender"</text:span></text:p>
      <text:p text:style-name="P6"><text:span text:style-name="T6">           </text:span><text:span text:style-name="T5">android</text:span><text:span text:style-name="T3">:layout_marginBottom</text:span><text:span text:style-name="T4">="4dp" </text:span><text:span text:style-name="T2">/&gt;</text:span></text:p>
      <text:p text:style-name="P7"><text:soft-page-break/>       <text:span text:style-name="T7">&lt;RadioGroup</text:span></text:p>
      <text:p text:style-name="P6"><text:span text:style-name="T8">           </text:span><text:span text:style-name="T5">android</text:span><text:span text:style-name="T3">:id</text:span><text:span text:style-name="T4">="@+id/rgGender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orientation</text:span><text:span text:style-name="T4">="horizontal"</text:span></text:p>
      <text:p text:style-name="P6"><text:span text:style-name="T6">           </text:span><text:span text:style-name="T5">android</text:span><text:span text:style-name="T3">:layout_marginBottom</text:span><text:span text:style-name="T4">="12dp"</text:span><text:span text:style-name="T2">&gt;</text:span></text:p>
      <text:p text:style-name="P7">           <text:span text:style-name="T7">&lt;RadioButton</text:span></text:p>
      <text:p text:style-name="P6"><text:span text:style-name="T8">               </text:span><text:span text:style-name="T5">android</text:span><text:span text:style-name="T3">:id</text:span><text:span text:style-name="T4">="@+id/rbMale"</text:span></text:p>
      <text:p text:style-name="P6"><text:span text:style-name="T6">               </text:span><text:span text:style-name="T5">android</text:span><text:span text:style-name="T3">:layout_width</text:span><text:span text:style-name="T4">="wrap_cont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rb_male" </text:span><text:span text:style-name="T2">/&gt;</text:span></text:p>
      <text:p text:style-name="P7">           <text:span text:style-name="T7">&lt;RadioButton</text:span></text:p>
      <text:p text:style-name="P6"><text:span text:style-name="T8">               </text:span><text:span text:style-name="T5">android</text:span><text:span text:style-name="T3">:id</text:span><text:span text:style-name="T4">="@+id/rbFemale"</text:span></text:p>
      <text:p text:style-name="P6"><text:span text:style-name="T6">               </text:span><text:span text:style-name="T5">android</text:span><text:span text:style-name="T3">:layout_width</text:span><text:span text:style-name="T4">="wrap_cont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rb_female" </text:span><text:span text:style-name="T2">/&gt;</text:span></text:p>
      <text:p text:style-name="P7">           <text:span text:style-name="T7">&lt;RadioButton</text:span></text:p>
      <text:p text:style-name="P6"><text:span text:style-name="T8">               </text:span><text:span text:style-name="T5">android</text:span><text:span text:style-name="T3">:id</text:span><text:span text:style-name="T4">="@+id/rbOther"</text:span></text:p>
      <text:p text:style-name="P6"><text:span text:style-name="T6">               </text:span><text:span text:style-name="T5">android</text:span><text:span text:style-name="T3">:layout_width</text:span><text:span text:style-name="T4">="wrap_cont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rb_other" </text:span><text:span text:style-name="T2">/&gt;</text:span></text:p>
      <text:p text:style-name="P7">       <text:span text:style-name="T7">&lt;/RadioGroup&gt;</text:span></text:p>
      <text:p text:style-name="P6"/>
      <text:p text:style-name="P6"><text:span text:style-name="T8">       </text:span><text:span text:style-name="T9">&lt;!-- 5. Email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Email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email"</text:span></text:p>
      <text:p text:style-name="P6"><text:span text:style-name="T6">           </text:span><text:span text:style-name="T5">android</text:span><text:span text:style-name="T3">:inputType</text:span><text:span text:style-name="T4">="textEmailAddress"</text:span></text:p>
      <text:p text:style-name="P6"><text:span text:style-name="T6">           </text:span><text:span text:style-name="T5">android</text:span><text:span text:style-name="T3">:autofillHints</text:span><text:span text:style-name="T4">="emailAddress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6. Phone Number --&gt;</text:span></text:p>
      <text:p text:style-name="P6"><text:span text:style-name="T10">       </text:span><text:span text:style-name="T2">&lt;EditText</text:span></text:p>
      <text:p text:style-name="P6"><text:soft-page-break/><text:span text:style-name="T8">           </text:span><text:span text:style-name="T5">android</text:span><text:span text:style-name="T3">:id</text:span><text:span text:style-name="T4">="@+id/etPhon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phone"</text:span></text:p>
      <text:p text:style-name="P6"><text:span text:style-name="T6">           </text:span><text:span text:style-name="T5">android</text:span><text:span text:style-name="T3">:inputType</text:span><text:span text:style-name="T4">="phone"</text:span></text:p>
      <text:p text:style-name="P6"><text:span text:style-name="T6">           </text:span><text:span text:style-name="T5">android</text:span><text:span text:style-name="T3">:autofillHints</text:span><text:span text:style-name="T4">="phoneNumber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7. Address Line 1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Address1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address1"</text:span></text:p>
      <text:p text:style-name="P6"><text:span text:style-name="T6">           </text:span><text:span text:style-name="T5">android</text:span><text:span text:style-name="T3">:inputType</text:span><text:span text:style-name="T4">="textPostalAddress"</text:span></text:p>
      <text:p text:style-name="P6"><text:span text:style-name="T6">           </text:span><text:span text:style-name="T5">android</text:span><text:span text:style-name="T3">:autofillHints</text:span><text:span text:style-name="T4">="postalAddress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8. Address Line 2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Address2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address2"</text:span></text:p>
      <text:p text:style-name="P6"><text:span text:style-name="T6">           </text:span><text:span text:style-name="T5">android</text:span><text:span text:style-name="T3">:inputType</text:span><text:span text:style-name="T4">="textPostalAddress"</text:span></text:p>
      <text:p text:style-name="P6"><text:span text:style-name="T6">           </text:span><text:span text:style-name="T5">android</text:span><text:span text:style-name="T3">:autofillHints</text:span><text:span text:style-name="T4">="postalAddress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9. City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City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city"</text:span></text:p>
      <text:p text:style-name="P6"><text:span text:style-name="T6">           </text:span><text:span text:style-name="T5">android</text:span><text:span text:style-name="T3">:inputType</text:span><text:span text:style-name="T4">="text"</text:span></text:p>
      <text:p text:style-name="P6"><text:soft-page-break/><text:span text:style-name="T6">           </text:span><text:span text:style-name="T5">android</text:span><text:span text:style-name="T3">:autofillHints</text:span><text:span text:style-name="T4">="postalAddressCity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0. State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Stat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state"</text:span></text:p>
      <text:p text:style-name="P6"><text:span text:style-name="T6">           </text:span><text:span text:style-name="T5">android</text:span><text:span text:style-name="T3">:inputType</text:span><text:span text:style-name="T4">="text"</text:span></text:p>
      <text:p text:style-name="P6"><text:span text:style-name="T6">           </text:span><text:span text:style-name="T5">android</text:span><text:span text:style-name="T3">:autofillHints</text:span><text:span text:style-name="T4">="postalAddressRegion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1. Zip Code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Zip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zip"</text:span></text:p>
      <text:p text:style-name="P6"><text:span text:style-name="T6">           </text:span><text:span text:style-name="T5">android</text:span><text:span text:style-name="T3">:inputType</text:span><text:span text:style-name="T4">="number"</text:span></text:p>
      <text:p text:style-name="P6"><text:span text:style-name="T6">           </text:span><text:span text:style-name="T5">android</text:span><text:span text:style-name="T3">:autofillHints</text:span><text:span text:style-name="T4">="postalCod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2. Country (Dropdown/Spinner) --&gt;</text:span></text:p>
      <text:p text:style-name="P6"><text:span text:style-name="T10">       </text:span><text:span text:style-name="T2">&lt;TextView</text:span></text:p>
      <text:p text:style-name="P6"><text:span text:style-name="T8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label_country"</text:span></text:p>
      <text:p text:style-name="P6"><text:span text:style-name="T6">           </text:span><text:span text:style-name="T5">android</text:span><text:span text:style-name="T3">:layout_marginBottom</text:span><text:span text:style-name="T4">="4dp" </text:span><text:span text:style-name="T2">/&gt;</text:span></text:p>
      <text:p text:style-name="P7">       <text:span text:style-name="T7">&lt;Spinner</text:span></text:p>
      <text:p text:style-name="P6"><text:span text:style-name="T8">           </text:span><text:span text:style-name="T5">android</text:span><text:span text:style-name="T3">:id</text:span><text:span text:style-name="T4">="@+id/spinnerCountry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entries</text:span><text:span text:style-name="T4">="@array/countries_array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><text:soft-page-break/></text:p>
      <text:p text:style-name="P6"><text:span text:style-name="T8">       </text:span><text:span text:style-name="T9">&lt;!-- 13. Course (Dropdown/Spinner) --&gt;</text:span></text:p>
      <text:p text:style-name="P6"><text:span text:style-name="T10">       </text:span><text:span text:style-name="T2">&lt;TextView</text:span></text:p>
      <text:p text:style-name="P6"><text:span text:style-name="T8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label_course"</text:span></text:p>
      <text:p text:style-name="P6"><text:span text:style-name="T6">           </text:span><text:span text:style-name="T5">android</text:span><text:span text:style-name="T3">:layout_marginBottom</text:span><text:span text:style-name="T4">="4dp" </text:span><text:span text:style-name="T2">/&gt;</text:span></text:p>
      <text:p text:style-name="P7">       <text:span text:style-name="T7">&lt;Spinner</text:span></text:p>
      <text:p text:style-name="P6"><text:span text:style-name="T8">           </text:span><text:span text:style-name="T5">android</text:span><text:span text:style-name="T3">:id</text:span><text:span text:style-name="T4">="@+id/spinnerCours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entries</text:span><text:span text:style-name="T4">="@array/courses_array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4. Father's Name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FatherNam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father_name"</text:span></text:p>
      <text:p text:style-name="P6"><text:span text:style-name="T6">           </text:span><text:span text:style-name="T5">android</text:span><text:span text:style-name="T3">:inputType</text:span><text:span text:style-name="T4">="textPersonName"</text:span></text:p>
      <text:p text:style-name="P6"><text:span text:style-name="T6">           </text:span><text:span text:style-name="T5">android</text:span><text:span text:style-name="T3">:autofillHints</text:span><text:span text:style-name="T4">="personNam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5. Mother's Name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MotherNam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mother_name"</text:span></text:p>
      <text:p text:style-name="P6"><text:span text:style-name="T6">           </text:span><text:span text:style-name="T5">android</text:span><text:span text:style-name="T3">:inputType</text:span><text:span text:style-name="T4">="textPersonName"</text:span></text:p>
      <text:p text:style-name="P6"><text:span text:style-name="T6">           </text:span><text:span text:style-name="T5">android</text:span><text:span text:style-name="T3">:autofillHints</text:span><text:span text:style-name="T4">="personNam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6. Emergency Contact Name --&gt;</text:span></text:p>
      <text:p text:style-name="P6"><text:soft-page-break/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EmergencyNam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emergency_name"</text:span></text:p>
      <text:p text:style-name="P6"><text:span text:style-name="T6">           </text:span><text:span text:style-name="T5">android</text:span><text:span text:style-name="T3">:inputType</text:span><text:span text:style-name="T4">="textPersonName"</text:span></text:p>
      <text:p text:style-name="P6"><text:span text:style-name="T6">           </text:span><text:span text:style-name="T5">android</text:span><text:span text:style-name="T3">:autofillHints</text:span><text:span text:style-name="T4">="personNam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7. Emergency Contact Phone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EmergencyPhone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emergency_phone"</text:span></text:p>
      <text:p text:style-name="P6"><text:span text:style-name="T6">           </text:span><text:span text:style-name="T5">android</text:span><text:span text:style-name="T3">:inputType</text:span><text:span text:style-name="T4">="phone"</text:span></text:p>
      <text:p text:style-name="P6"><text:span text:style-name="T6">           </text:span><text:span text:style-name="T5">android</text:span><text:span text:style-name="T3">:autofillHints</text:span><text:span text:style-name="T4">="phoneNumber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18. Previous Institution --&gt;</text:span></text:p>
      <text:p text:style-name="P6"><text:span text:style-name="T10">       </text:span><text:span text:style-name="T2">&lt;EditText</text:span></text:p>
      <text:p text:style-name="P6"><text:span text:style-name="T8">           </text:span><text:span text:style-name="T5">android</text:span><text:span text:style-name="T3">:id</text:span><text:span text:style-name="T4">="@+id/etPreviousInstitution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hint</text:span><text:span text:style-name="T4">="@string/hint_previous_inst"</text:span></text:p>
      <text:p text:style-name="P6"><text:span text:style-name="T6">           </text:span><text:span text:style-name="T5">android</text:span><text:span text:style-name="T3">:inputType</text:span><text:span text:style-name="T4">="text"</text:span></text:p>
      <text:p text:style-name="P6"><text:span text:style-name="T6">           </text:span><text:span text:style-name="T5">android</text:span><text:span text:style-name="T3">:autofillHints</text:span><text:span text:style-name="T4">="none"</text:span></text:p>
      <text:p text:style-name="P6"><text:span text:style-name="T6">           </text:span><text:span text:style-name="T5">android</text:span><text:span text:style-name="T3">:layout_marginBottom</text:span><text:span text:style-name="T4">="12dp" </text:span><text:span text:style-name="T2">/&gt;</text:span></text:p>
      <text:p text:style-name="P6"/>
      <text:p text:style-name="P6"><text:span text:style-name="T8">       </text:span><text:span text:style-name="T9">&lt;!-- Multiple Checkboxes Group (Documents) --&gt;</text:span></text:p>
      <text:p text:style-name="P6"><text:span text:style-name="T10">       </text:span><text:span text:style-name="T2">&lt;TextView</text:span></text:p>
      <text:p text:style-name="P6"><text:span text:style-name="T8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label_documents"</text:span></text:p>
      <text:p text:style-name="P6"><text:span text:style-name="T6">           </text:span><text:span text:style-name="T5">android</text:span><text:span text:style-name="T3">:layout_marginBottom</text:span><text:span text:style-name="T4">="4dp"</text:span></text:p>
      <text:p text:style-name="P6"><text:soft-page-break/><text:span text:style-name="T6">           </text:span><text:span text:style-name="T5">android</text:span><text:span text:style-name="T3">:textStyle</text:span><text:span text:style-name="T4">="bold" </text:span><text:span text:style-name="T2">/&gt;</text:span></text:p>
      <text:p text:style-name="P6"/>
      <text:p text:style-name="P7">       <text:span text:style-name="T7">&lt;LinearLayout</text:span></text:p>
      <text:p text:style-name="P6"><text:span text:style-name="T8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orientation</text:span><text:span text:style-name="T4">="vertical"</text:span></text:p>
      <text:p text:style-name="P6"><text:span text:style-name="T6">           </text:span><text:span text:style-name="T5">android</text:span><text:span text:style-name="T3">:paddingStart</text:span><text:span text:style-name="T4">="8dp"</text:span></text:p>
      <text:p text:style-name="P6"><text:span text:style-name="T6">           </text:span><text:span text:style-name="T5">android</text:span><text:span text:style-name="T3">:layout_marginBottom</text:span><text:span text:style-name="T4">="12dp"</text:span></text:p>
      <text:p text:style-name="P6"><text:span text:style-name="T6">           </text:span><text:span text:style-name="T5">android</text:span><text:span text:style-name="T3">:paddingLeft</text:span><text:span text:style-name="T4">="8dp"</text:span><text:span text:style-name="T2">&gt;</text:span></text:p>
      <text:p text:style-name="P6"><text:span text:style-name="T8">           </text:span><text:span text:style-name="T9">&lt;!-- 19. Marksheet --&gt;</text:span></text:p>
      <text:p text:style-name="P6"><text:span text:style-name="T10">           </text:span><text:span text:style-name="T2">&lt;CheckBox</text:span></text:p>
      <text:p text:style-name="P6"><text:span text:style-name="T8">               </text:span><text:span text:style-name="T5">android</text:span><text:span text:style-name="T3">:id</text:span><text:span text:style-name="T4">="@+id/cbMarksheet"</text:span></text:p>
      <text:p text:style-name="P6"><text:span text:style-name="T6">    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cb_marksheet" </text:span><text:span text:style-name="T2">/&gt;</text:span></text:p>
      <text:p text:style-name="P6"><text:span text:style-name="T8">           </text:span><text:span text:style-name="T9">&lt;!-- 20. ID Proof --&gt;</text:span></text:p>
      <text:p text:style-name="P6"><text:span text:style-name="T10">           </text:span><text:span text:style-name="T2">&lt;CheckBox</text:span></text:p>
      <text:p text:style-name="P6"><text:span text:style-name="T8">               </text:span><text:span text:style-name="T5">android</text:span><text:span text:style-name="T3">:id</text:span><text:span text:style-name="T4">="@+id/cbIdProof"</text:span></text:p>
      <text:p text:style-name="P6"><text:span text:style-name="T6">    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cb_id_proof" </text:span><text:span text:style-name="T2">/&gt;</text:span></text:p>
      <text:p text:style-name="P6"><text:span text:style-name="T8">           </text:span><text:span text:style-name="T9">&lt;!-- 21. Transfer Certificate --&gt;</text:span></text:p>
      <text:p text:style-name="P6"><text:span text:style-name="T10">           </text:span><text:span text:style-name="T2">&lt;CheckBox</text:span></text:p>
      <text:p text:style-name="P6"><text:span text:style-name="T8">               </text:span><text:span text:style-name="T5">android</text:span><text:span text:style-name="T3">:id</text:span><text:span text:style-name="T4">="@+id/cbTC"</text:span></text:p>
      <text:p text:style-name="P6"><text:span text:style-name="T6">    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cb_tc" </text:span><text:span text:style-name="T2">/&gt;</text:span></text:p>
      <text:p text:style-name="P6"><text:span text:style-name="T8">           </text:span><text:span text:style-name="T9">&lt;!-- 22. Migration Certificate --&gt;</text:span></text:p>
      <text:p text:style-name="P6"><text:span text:style-name="T10">           </text:span><text:span text:style-name="T2">&lt;CheckBox</text:span></text:p>
      <text:p text:style-name="P6"><text:span text:style-name="T8">               </text:span><text:span text:style-name="T5">android</text:span><text:span text:style-name="T3">:id</text:span><text:span text:style-name="T4">="@+id/cbMigration"</text:span></text:p>
      <text:p text:style-name="P6"><text:span text:style-name="T6">    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    </text:span><text:span text:style-name="T5">android</text:span><text:span text:style-name="T3">:text</text:span><text:span text:style-name="T4">="@string/cb_migration" </text:span><text:span text:style-name="T2">/&gt;</text:span></text:p>
      <text:p text:style-name="P7">       <text:span text:style-name="T7">&lt;/LinearLayout&gt;</text:span></text:p>
      <text:p text:style-name="P6"/>
      <text:p text:style-name="P6"><text:soft-page-break/><text:span text:style-name="T8">       </text:span><text:span text:style-name="T9">&lt;!-- 23. Newsletter (Single Checkbox) --&gt;</text:span></text:p>
      <text:p text:style-name="P6"><text:span text:style-name="T10">       </text:span><text:span text:style-name="T2">&lt;CheckBox</text:span></text:p>
      <text:p text:style-name="P6"><text:span text:style-name="T8">           </text:span><text:span text:style-name="T5">android</text:span><text:span text:style-name="T3">:id</text:span><text:span text:style-name="T4">="@+id/cbNewsletter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cb_newsletter"</text:span></text:p>
      <text:p text:style-name="P6"><text:span text:style-name="T6">           </text:span><text:span text:style-name="T5">android</text:span><text:span text:style-name="T3">:layout_marginBottom</text:span><text:span text:style-name="T4">="24dp" </text:span><text:span text:style-name="T2">/&gt;</text:span></text:p>
      <text:p text:style-name="P6"/>
      <text:p text:style-name="P7">       <text:span text:style-name="T7">&lt;Button</text:span></text:p>
      <text:p text:style-name="P6"><text:span text:style-name="T8">           </text:span><text:span text:style-name="T5">android</text:span><text:span text:style-name="T3">:id</text:span><text:span text:style-name="T4">="@+id/btnSubmit"</text:span></text:p>
      <text:p text:style-name="P6"><text:span text:style-name="T6">           </text:span><text:span text:style-name="T5">android</text:span><text:span text:style-name="T3">:layout_width</text:span><text:span text:style-name="T4">="match_parent"</text:span></text:p>
      <text:p text:style-name="P6"><text:span text:style-name="T6">           </text:span><text:span text:style-name="T5">android</text:span><text:span text:style-name="T3">:layout_height</text:span><text:span text:style-name="T4">="wrap_content"</text:span></text:p>
      <text:p text:style-name="P6"><text:span text:style-name="T6">           </text:span><text:span text:style-name="T5">android</text:span><text:span text:style-name="T3">:text</text:span><text:span text:style-name="T4">="@string/btn_register"</text:span></text:p>
      <text:p text:style-name="P6"><text:span text:style-name="T6">           </text:span><text:span text:style-name="T5">android</text:span><text:span text:style-name="T3">:layout_marginBottom</text:span><text:span text:style-name="T4">="32dp" </text:span><text:span text:style-name="T2">/&gt;</text:span></text:p>
      <text:p text:style-name="P6"/>
      <text:p text:style-name="P7">   <text:span text:style-name="T7">&lt;/LinearLayout&gt;</text:span></text:p>
      <text:p text:style-name="P8">&lt;/ScrollView&gt;</text:p>
      <text:p text:style-name="P4"/>
      <text:p text:style-name="P5">MainActivity.java</text:p>
      <text:p text:style-name="P4"/>
      <text:p text:style-name="P6"><text:span text:style-name="T11">package </text:span><text:span text:style-name="T3">com.example.assignment_1</text:span></text:p>
      <text:p text:style-name="P6"/>
      <text:p text:style-name="P6"><text:span text:style-name="T11">import </text:span><text:span text:style-name="T3">android.os.Bundle</text:span></text:p>
      <text:p text:style-name="P6"><text:span text:style-name="T11">import </text:span><text:span text:style-name="T3">android.widget.Button</text:span></text:p>
      <text:p text:style-name="P6"><text:span text:style-name="T11">import </text:span><text:span text:style-name="T3">android.widget.Toast</text:span></text:p>
      <text:p text:style-name="P6"><text:span text:style-name="T11">import </text:span><text:span text:style-name="T3">androidx.activity.enableEdgeToEdge</text:span></text:p>
      <text:p text:style-name="P6"><text:span text:style-name="T11">import </text:span><text:span text:style-name="T3">androidx.appcompat.app.AppCompatActivity</text:span></text:p>
      <text:p text:style-name="P6"><text:span text:style-name="T11">import </text:span><text:span text:style-name="T3">androidx.core.view.ViewCompat</text:span></text:p>
      <text:p text:style-name="P6"><text:span text:style-name="T11">import </text:span><text:span text:style-name="T3">androidx.core.view.WindowInsetsCompat</text:span></text:p>
      <text:p text:style-name="P6"/>
      <text:p text:style-name="P6"><text:span text:style-name="T11">class </text:span><text:span text:style-name="T3">MainActivity : AppCompatActivity() {</text:span></text:p>
      <text:p text:style-name="P6"><text:span text:style-name="T12">   </text:span><text:span text:style-name="T11">override fun </text:span><text:span text:style-name="T13">onCreate</text:span><text:span text:style-name="T3">(savedInstanceState: Bundle?) {</text:span></text:p>
      <text:p text:style-name="P6"><text:span text:style-name="T12">       </text:span><text:span text:style-name="T11">super</text:span><text:span text:style-name="T3">.onCreate(savedInstanceState)</text:span></text:p>
      <text:p text:style-name="P6"><text:span text:style-name="T12">       </text:span><text:span text:style-name="T14">enableEdgeToEdge</text:span><text:span text:style-name="T3">()</text:span></text:p>
      <text:p text:style-name="P6"><text:span text:style-name="T12">       </text:span><text:span text:style-name="T3">setContentView(R.layout.</text:span><text:span text:style-name="T15">activity_main</text:span><text:span text:style-name="T3">)</text:span></text:p>
      <text:p text:style-name="P9">      </text:p>
      <text:p text:style-name="P6"><text:soft-page-break/><text:span text:style-name="T12">       </text:span><text:span text:style-name="T3">ViewCompat.setOnApplyWindowInsetsListener(findViewById(R.id.</text:span><text:span text:style-name="T15">main</text:span><text:span text:style-name="T3">)) </text:span><text:span text:style-name="T16">{ </text:span><text:span text:style-name="T3">v, insets </text:span><text:span text:style-name="T16">-&gt;</text:span></text:p>
      <text:p text:style-name="P6"><text:span text:style-name="T12">           </text:span><text:span text:style-name="T11">val </text:span><text:span text:style-name="T3">systemBars = insets.getInsets(WindowInsetsCompat.Type.systemBars())</text:span></text:p>
      <text:p text:style-name="P6"><text:span text:style-name="T12">           </text:span><text:span text:style-name="T3">v.setPadding(systemBars.</text:span><text:span text:style-name="T5">left</text:span><text:span text:style-name="T3">, systemBars.</text:span><text:span text:style-name="T5">top</text:span><text:span text:style-name="T3">, systemBars.</text:span><text:span text:style-name="T5">right</text:span><text:span text:style-name="T3">, systemBars.</text:span><text:span text:style-name="T5">bottom</text:span><text:span text:style-name="T3">)</text:span></text:p>
      <text:p text:style-name="P9">           <text:span text:style-name="T7">insets</text:span></text:p>
      <text:p text:style-name="P6"><text:span text:style-name="T12">       </text:span><text:span text:style-name="T16">}</text:span></text:p>
      <text:p text:style-name="P6"/>
      <text:p text:style-name="P6"><text:span text:style-name="T12">       </text:span><text:span text:style-name="T11">val </text:span><text:span text:style-name="T3">btnSubmit = findViewById&lt;Button&gt;(R.id.</text:span><text:span text:style-name="T15">btnSubmit</text:span><text:span text:style-name="T3">)</text:span></text:p>
      <text:p text:style-name="P6"><text:span text:style-name="T12">       </text:span><text:span text:style-name="T3">btnSubmit.setOnClickListener </text:span><text:span text:style-name="T16">{</text:span></text:p>
      <text:p text:style-name="P6"><text:span text:style-name="T12">           </text:span><text:span text:style-name="T9">// Basic validation or just showing a success message</text:span></text:p>
      <text:p text:style-name="P6"><text:span text:style-name="T10">           </text:span><text:span text:style-name="T3">Toast.makeText(</text:span><text:span text:style-name="T11">this</text:span><text:span text:style-name="T3">, </text:span><text:span text:style-name="T4">"Registration Successful!"</text:span><text:span text:style-name="T3">, Toast.</text:span><text:span text:style-name="T15">LENGTH_SHORT</text:span><text:span text:style-name="T3">).show()</text:span></text:p>
      <text:p text:style-name="P6"><text:span text:style-name="T12">       </text:span><text:span text:style-name="T16">}</text:span></text:p>
      <text:p text:style-name="P6"><text:span text:style-name="T12">   </text:span><text:span text:style-name="T3">}</text:span></text:p>
      <text:p text:style-name="P10">}</text:p>
      <text:p text:style-name="P4"/>
      <text:p text:style-name="P11">Output Screenshots: </text:p>
      <text:p text:style-name="P4"><text:line-break/></text:p>
      <text:p text:style-name="P12"><text:soft-page-break/><text:span text:style-name="T17"><draw:frame draw:style-name="fr1" draw:name="Image1" text:anchor-type="as-char" svg:width="2.1457in" svg:height="4.7602in" draw:z-index="0"><draw:image xlink:href="Pictures/10000001000002D000000640D8D5D4C0.png" xlink:type="simple" xlink:show="embed" xlink:actuate="onLoad" draw:mime-type="image/png"/></draw:frame></text:span><text:span text:style-name="T17"><draw:frame draw:style-name="fr1" draw:name="Image2" text:anchor-type="as-char" svg:width="2.1563in" svg:height="4.8126in" draw:z-index="1"><draw:image xlink:href="Pictures/10000001000002D000000640B40F1FAA.png" xlink:type="simple" xlink:show="embed" xlink:actuate="onLoad" draw:mime-type="image/png"/></draw:frame></text:span><text:span text:style-name="T17"><draw:frame draw:style-name="fr1" draw:name="Image3" text:anchor-type="as-char" svg:width="2.1772in" svg:height="4.8335in" draw:z-index="2"><draw:image xlink:href="Pictures/10000001000002D000000640D0462407.png" xlink:type="simple" xlink:show="embed" xlink:actuate="onLoad" draw:mime-type="image/png"/></draw:frame></text:span></text:p>
      <text:p text:style-name="P4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Courier New" svg:font-family="'Courier New', monospace"/>
    <style:font-face style:name="LM Roman 12" svg:font-family="'LM Roman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5:09:13.249369584</meta:creation-date>
    <meta:print-date>2026-04-13T15:13:24.796789155</meta:print-date>
    <meta:printed-by>PDF files</meta:printed-by>
    <dc:date>2026-04-13T15:28:07.012990571</dc:date>
    <meta:editing-duration>PT7M52S</meta:editing-duration>
    <meta:editing-cycles>1</meta:editing-cycles>
    <meta:document-statistic meta:table-count="0" meta:image-count="3" meta:object-count="0" meta:page-count="11" meta:paragraph-count="299" meta:word-count="511" meta:character-count="11802" meta:non-whitespace-character-count="8796"/>
    <meta:generator>LibreOffice/25.8.6.2$Linux_X86_64 LibreOffice_project/580$Build-2</meta:generator>
  </office:meta>
</office:document-meta>
</file>